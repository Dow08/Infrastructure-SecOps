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D000000609DFC021226D1E325.png" manifest:media-type="image/png"/>
  <manifest:file-entry manifest:full-path="Pictures/10000000000009C400000683610BB9CD14785A82.jpg" manifest:media-type="image/jpeg"/>
  <manifest:file-entry manifest:full-path="Pictures/100002010000044E000002002B4157F761680B93.png" manifest:media-type="image/png"/>
  <manifest:file-entry manifest:full-path="Pictures/1000020100000128000000C601AE6BDC2A7E6AB9.png" manifest:media-type="image/png"/>
  <manifest:file-entry manifest:full-path="Pictures/10000201000004B200000322DBA1C4254C58C51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Inter Medium" svg:font-family="'Inter Medium'"/>
    <style:font-face style:name="Inter SemiBold" svg:font-family="'Inter SemiBold'"/>
    <style:font-face style:name="Libre Baskerville" svg:font-family="'Libre Baskervill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14577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c3fff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e3449" style:text-line-through-style="none" style:text-line-through-type="none" style:text-position="0% 100%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 Medium" fo:font-size="25pt" fo:letter-spacing="normal" fo:font-style="normal" style:text-underline-style="none" fo:font-weight="normal" style:font-name-asian="Inter Medium" style:font-size-asian="25pt" style:font-style-asian="normal" style:font-weight-asian="normal" style:font-name-complex="Inter Medium" style:font-size-complex="25pt" style:font-style-complex="normal" style:font-weight-complex="normal"/>
    </style:style>
    <style:style style:name="T3" style:family="text">
      <style:text-properties fo:font-variant="normal" fo:text-transform="none" fo:color="#0e3449" style:text-line-through-style="none" style:text-line-through-type="none" style:text-position="0% 100%" style:font-name="Inter" fo:font-size="45pt" fo:letter-spacing="normal" fo:font-style="normal" style:text-underline-style="none" fo:font-weight="bold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4" style:family="text">
      <style:text-properties fo:font-variant="normal" fo:text-transform="none" fo:color="#0e3449" style:text-line-through-style="none" style:text-line-through-type="none" style:text-position="0% 100%" style:font-name="Inter SemiBold" fo:font-size="25pt" fo:letter-spacing="normal" fo:font-style="normal" style:text-underline-style="none" fo:font-weight="normal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5" style:family="text">
      <style:text-properties fo:font-variant="normal" fo:text-transform="none" fo:color="#4b5258" style:text-line-through-style="none" style:text-line-through-type="none" style:text-position="0% 100%" style:font-name="Inter Medium" fo:font-size="20pt" fo:letter-spacing="normal" fo:font-style="normal" style:text-underline-style="none" fo:font-weight="normal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6" style:family="text">
      <style:text-properties fo:font-variant="normal" fo:text-transform="none" fo:color="#015955" style:text-line-through-style="none" style:text-line-through-type="none" style:text-position="0% 100%" style:font-name="Inter" fo:font-size="24pt" fo:letter-spacing="normal" fo:font-style="normal" style:text-underline-style="none" fo:font-weight="normal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7" style:family="text">
      <style:text-properties fo:font-variant="normal" fo:text-transform="none" fo:color="#4b5258" style:text-line-through-style="none" style:text-line-through-type="none" style:text-position="0% 100%" style:font-name="Inter" fo:font-size="20pt" fo:letter-spacing="normal" fo:font-style="normal" style:text-underline-style="none" fo:font-weight="normal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8" style:family="text">
      <style:text-properties fo:font-variant="normal" fo:text-transform="none" fo:color="#0e3449" style:text-line-through-style="none" style:text-line-through-type="none" style:text-position="0% 100%" style:font-name="Inter" fo:font-size="16pt" fo:letter-spacing="normal" fo:font-style="normal" style:text-underline-style="none" fo:font-weight="normal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9" style:family="text">
      <style:text-properties fo:font-variant="normal" fo:text-transform="none" fo:color="#4b5258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ibre Baskerville" fo:font-size="32pt" fo:letter-spacing="normal" fo:font-style="normal" style:text-underline-style="none" fo:font-weight="normal" style:font-name-asian="Libre Baskerville" style:font-size-asian="32pt" style:font-style-asian="normal" style:font-weight-asian="normal" style:font-name-complex="Libre Baskerville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2" style:family="text">
      <style:text-properties fo:font-variant="normal" fo:text-transform="none" fo:color="#0e3449" style:text-line-through-style="none" style:text-line-through-type="none" style:text-position="0% 100%" style:font-name="Inter" fo:font-size="56pt" fo:letter-spacing="normal" fo:font-style="normal" style:text-underline-style="none" fo:font-weight="bold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3" style:family="text">
      <style:text-properties fo:font-variant="normal" fo:text-transform="none" fo:color="#0e3449" style:text-line-through-style="none" style:text-line-through-type="none" style:text-position="0% 100%" style:font-name="Inter Medium" fo:font-size="24pt" fo:letter-spacing="normal" fo:font-style="normal" style:text-underline-style="none" fo:font-weight="normal" style:font-name-asian="Inter Medium" style:font-size-asian="24pt" style:font-style-asian="normal" style:font-weight-asian="normal" style:font-name-complex="Inter Medium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Nova Syndicate" presentation:presentation-page-layout-name="AL1T0">
        <draw:frame draw:name="Google Shape;54;p13" presentation:style-name="pr1" draw:text-style-name="P2" draw:layer="layout" svg:width="17.994cm" svg:height="1.715cm" svg:x="2.043cm" svg:y="4.75cm" presentation:class="title" presentation:user-transformed="true">
          <draw:text-box>
            <text:p text:style-name="P1"><text:span text:style-name="T1">Nova Syndicat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201000004B200000322DBA1C4254C58C51B.png" xlink:type="simple" xlink:show="embed" xlink:actuate="onLoad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20100000128000000C601AE6BDC2A7E6AB9.png" xlink:type="simple" xlink:show="embed" xlink:actuate="onLoad">
            <text:p/>
          </draw:image>
        </draw:frame>
        <draw:frame draw:name="Google Shape;57;p13" presentation:style-name="pr1" draw:text-style-name="P2" draw:layer="layout" svg:width="14.763cm" svg:height="1.48cm" svg:x="2.043cm" svg:y="6.827cm" presentation:class="title" presentation:user-transformed="true">
          <draw:text-box>
            <text:p text:style-name="P1"><text:span text:style-name="T2">Infrastructure Réseau Sécurisée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2" draw:style-name="dp4" draw:master-page-name="TITLE_5f_AND_5f_BODY" presentation:presentation-page-layout-name="AL2T1">
        <draw:frame draw:name="Google Shape;68;p15" presentation:style-name="pr3" draw:text-style-name="P5" draw:layer="layout" svg:width="14.763cm" svg:height="1.48cm" svg:x="3.313cm" svg:y="1.12cm" presentation:class="title" presentation:user-transformed="true">
          <draw:text-box>
            <text:p text:style-name="P1"><text:span text:style-name="T4">Contexte et Objectifs</text:span></text:p>
          </draw:text-box>
        </draw:frame>
        <draw:frame draw:name="Google Shape;69;p15" presentation:style-name="pr3" draw:text-style-name="P5" draw:layer="layout" svg:width="14.763cm" svg:height="1.48cm" svg:x="2.493cm" svg:y="5.546cm" presentation:class="title" presentation:user-transformed="true">
          <draw:text-box>
            <text:p text:style-name="P1"><text:span text:style-name="T5">BricoPro (e-commerce) — 2 sites : Lyon + Marseille</text:span></text:p>
          </draw:text-box>
        </draw:frame>
        <draw:custom-shape draw:name="Google Shape;70;p15" draw:style-name="gr3" draw:text-style-name="P6" draw:layer="layout" svg:width="0.725cm" svg:height="0.129cm" draw:transform="rotate (0.103498024643264) translate (1.55cm 6.25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5" presentation:style-name="pr3" draw:text-style-name="P5" draw:layer="layout" svg:width="14.763cm" svg:height="1.48cm" svg:x="2.493cm" svg:y="7.026cm" presentation:class="title" presentation:user-transformed="true">
          <draw:text-box>
            <text:p text:style-name="P1"><text:span text:style-name="T5">Infrastructure complète, segmentée, sécurisée</text:span></text:p>
          </draw:text-box>
        </draw:frame>
        <draw:custom-shape draw:name="Google Shape;72;p15" draw:style-name="gr3" draw:text-style-name="P6" draw:layer="layout" svg:width="0.725cm" svg:height="0.129cm" draw:transform="rotate (0.103498024643264) translate (1.55cm 7.74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3;p15" presentation:style-name="pr3" draw:text-style-name="P5" draw:layer="layout" svg:width="14.763cm" svg:height="1.48cm" svg:x="2.493cm" svg:y="8.507cm" presentation:class="title" presentation:user-transformed="true">
          <draw:text-box>
            <text:p text:style-name="P1"><text:span text:style-name="T5">Conforme ISO 27001 · ANSSI · NIST</text:span></text:p>
          </draw:text-box>
        </draw:frame>
        <draw:custom-shape draw:name="Google Shape;74;p15" draw:style-name="gr3" draw:text-style-name="P6" draw:layer="layout" svg:width="0.725cm" svg:height="0.129cm" draw:transform="rotate (0.103498024643264) translate (1.55cm 9.221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6;p15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3" draw:style-name="dp4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frame draw:name="Google Shape;95;p17" presentation:style-name="pr3" draw:text-style-name="P5" draw:layer="layout" svg:width="14.763cm" svg:height="1.071cm" svg:x="5.218cm" svg:y="0.909cm" presentation:class="title" presentation:user-transformed="true">
          <draw:text-box>
            <text:p text:style-name="P7"><text:span text:style-name="T8">Architecture Cible</text:span></text:p>
          </draw:text-box>
        </draw:frame>
        <draw:frame draw:name="Google Shape;96;p17" presentation:style-name="pr3" draw:text-style-name="P5" draw:layer="layout" svg:width="21.591cm" svg:height="0.873cm" svg:x="1.804cm" svg:y="12.412cm" presentation:class="title" presentation:user-transformed="true">
          <draw:text-box>
            <text:p text:style-name="P7"><text:span text:style-name="T9">Hub &amp; Spoke · Defense in Depth · 12 VMs · IPsec AES-256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610BB9CD14785A82.jpg" xlink:type="simple" xlink:show="embed" xlink:actuate="onLoad">
            <text:p/>
          </draw:image>
        </draw:frame>
        <draw:custom-shape draw:name="Google Shape;98;p17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f4f11f959e_0_29:notes" draw:style-name="gr2" draw:layer="layout" svg:width="16.932cm" svg:height="9.524cm" svg:x="1.059cm" svg:y="1.905cm" draw:page-number="3" presentation:class="page"/>
          <draw:frame draw:name="Google Shape;92;gf4f11f959e_0_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4" draw:style-name="dp4" draw:master-page-name="TITLE_5f_AND_5f_BODY" presentation:presentation-page-layout-name="AL2T1">
        <draw:frame draw:name="Google Shape;68;p15" presentation:style-name="pr3" draw:text-style-name="P5" draw:layer="layout" svg:width="14.763cm" svg:height="1.48cm" svg:x="3.313cm" svg:y="1.12cm" presentation:class="title" presentation:user-transformed="true">
          <draw:text-box>
            <text:p text:style-name="P1"><text:span text:style-name="T4">Stack Technique</text:span></text:p>
          </draw:text-box>
        </draw:frame>
        <draw:frame draw:name="Google Shape;69;p15" presentation:style-name="pr3" draw:text-style-name="P5" draw:layer="layout" svg:width="14.763cm" svg:height="1.48cm" svg:x="2.493cm" svg:y="5.546cm" presentation:class="title" presentation:user-transformed="true">
          <draw:text-box>
            <text:p text:style-name="P1"><text:span text:style-name="T5">Proxmox VE 9 · OPNsense · Samba 4 AD · MariaDB</text:span></text:p>
          </draw:text-box>
        </draw:frame>
        <draw:custom-shape draw:name="Google Shape;70;p15" draw:style-name="gr3" draw:text-style-name="P6" draw:layer="layout" svg:width="0.725cm" svg:height="0.129cm" draw:transform="rotate (0.103498024643264) translate (1.55cm 6.25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5" presentation:style-name="pr3" draw:text-style-name="P5" draw:layer="layout" svg:width="14.763cm" svg:height="1.48cm" svg:x="2.493cm" svg:y="7.026cm" presentation:class="title" presentation:user-transformed="true">
          <draw:text-box>
            <text:p text:style-name="P1"><text:span text:style-name="T5">Wazuh SIEM · Suricata IDS · Prometheus · Grafana</text:span></text:p>
          </draw:text-box>
        </draw:frame>
        <draw:custom-shape draw:name="Google Shape;72;p15" draw:style-name="gr3" draw:text-style-name="P6" draw:layer="layout" svg:width="0.725cm" svg:height="0.129cm" draw:transform="rotate (0.103498024643264) translate (1.55cm 7.74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3;p15" presentation:style-name="pr3" draw:text-style-name="P5" draw:layer="layout" svg:width="14.763cm" svg:height="1.48cm" svg:x="2.493cm" svg:y="8.507cm" presentation:class="title" presentation:user-transformed="true">
          <draw:text-box>
            <text:p text:style-name="P1"><text:span text:style-name="T5">Terraform + Ansible (10 playbooks) · CI/CD DevSecOps</text:span></text:p>
          </draw:text-box>
        </draw:frame>
        <draw:custom-shape draw:name="Google Shape;74;p15" draw:style-name="gr3" draw:text-style-name="P6" draw:layer="layout" svg:width="0.725cm" svg:height="0.129cm" draw:transform="rotate (0.103498024643264) translate (1.55cm 9.221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6;p15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4" presentation:class="page"/>
          <draw:frame draw:name="Google Shape;66;g3bc3b886ea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5" draw:style-name="dp4" draw:master-page-name="TITLE_5f_AND_5f_BODY" presentation:presentation-page-layout-name="AL2T1">
        <draw:frame draw:name="Google Shape;68;p15" presentation:style-name="pr3" draw:text-style-name="P5" draw:layer="layout" svg:width="14.763cm" svg:height="1.48cm" svg:x="3.313cm" svg:y="1.12cm" presentation:class="title" presentation:user-transformed="true">
          <draw:text-box>
            <text:p text:style-name="P1"><text:span text:style-name="T4">Déploiement et Infrastructure-as-Code</text:span></text:p>
          </draw:text-box>
        </draw:frame>
        <draw:frame draw:name="Google Shape;69;p15" presentation:style-name="pr3" draw:text-style-name="P5" draw:layer="layout" svg:width="14.763cm" svg:height="1.48cm" svg:x="2.493cm" svg:y="5.546cm" presentation:class="title" presentation:user-transformed="true">
          <draw:text-box>
            <text:p text:style-name="P1"><text:span text:style-name="T5">Terraform : 12 VMs + bridges + VLANs sur Proxmox</text:span></text:p>
          </draw:text-box>
        </draw:frame>
        <draw:custom-shape draw:name="Google Shape;70;p15" draw:style-name="gr3" draw:text-style-name="P6" draw:layer="layout" svg:width="0.725cm" svg:height="0.129cm" draw:transform="rotate (0.103498024643264) translate (1.55cm 6.25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5" presentation:style-name="pr3" draw:text-style-name="P5" draw:layer="layout" svg:width="14.763cm" svg:height="1.48cm" svg:x="2.493cm" svg:y="7.026cm" presentation:class="title" presentation:user-transformed="true">
          <draw:text-box>
            <text:p text:style-name="P1"><text:span text:style-name="T5">Ansible : 10 playbooks idempotents (site.yml)</text:span></text:p>
          </draw:text-box>
        </draw:frame>
        <draw:custom-shape draw:name="Google Shape;72;p15" draw:style-name="gr3" draw:text-style-name="P6" draw:layer="layout" svg:width="0.725cm" svg:height="0.129cm" draw:transform="rotate (0.103498024643264) translate (1.55cm 7.74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3;p15" presentation:style-name="pr3" draw:text-style-name="P5" draw:layer="layout" svg:width="14.763cm" svg:height="1.48cm" svg:x="2.493cm" svg:y="8.507cm" presentation:class="title" presentation:user-transformed="true">
          <draw:text-box>
            <text:p text:style-name="P1"><text:span text:style-name="T5">Redéploiement complet en 45 min · Reproductible · DR</text:span></text:p>
          </draw:text-box>
        </draw:frame>
        <draw:custom-shape draw:name="Google Shape;74;p15" draw:style-name="gr3" draw:text-style-name="P6" draw:layer="layout" svg:width="0.725cm" svg:height="0.129cm" draw:transform="rotate (0.103498024643264) translate (1.55cm 9.221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6;p15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5" presentation:class="page"/>
          <draw:frame draw:name="Google Shape;66;g3bc3b886ea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6" draw:style-name="dp4" draw:master-page-name="TITLE_5f_AND_5f_BODY" presentation:presentation-page-layout-name="AL2T1">
        <draw:frame draw:name="Google Shape;68;p15" presentation:style-name="pr3" draw:text-style-name="P5" draw:layer="layout" svg:width="14.763cm" svg:height="1.48cm" svg:x="3.313cm" svg:y="1.12cm" presentation:class="title" presentation:user-transformed="true">
          <draw:text-box>
            <text:p text:style-name="P1"><text:span text:style-name="T4">Defense in Depth — 5 Couches</text:span></text:p>
          </draw:text-box>
        </draw:frame>
        <draw:frame draw:name="Google Shape;69;p15" presentation:style-name="pr3" draw:text-style-name="P5" draw:layer="layout" svg:width="14.763cm" svg:height="1.48cm" svg:x="2.493cm" svg:y="5.546cm" presentation:class="title" presentation:user-transformed="true">
          <draw:text-box>
            <text:p text:style-name="P1"><text:span text:style-name="T5">1. Périmètre (OPNsense + Suricata 5 865 règles)</text:span></text:p>
          </draw:text-box>
        </draw:frame>
        <draw:custom-shape draw:name="Google Shape;70;p15" draw:style-name="gr3" draw:text-style-name="P6" draw:layer="layout" svg:width="0.725cm" svg:height="0.129cm" draw:transform="rotate (0.103498024643264) translate (1.55cm 6.25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5" presentation:style-name="pr3" draw:text-style-name="P5" draw:layer="layout" svg:width="14.763cm" svg:height="1.48cm" svg:x="2.493cm" svg:y="7.026cm" presentation:class="title" presentation:user-transformed="true">
          <draw:text-box>
            <text:p text:style-name="P1"><text:span text:style-name="T5">2. Segmentation (5 VLANs) + 3. Hardening (Fail2ban)</text:span></text:p>
          </draw:text-box>
        </draw:frame>
        <draw:custom-shape draw:name="Google Shape;72;p15" draw:style-name="gr3" draw:text-style-name="P6" draw:layer="layout" svg:width="0.725cm" svg:height="0.129cm" draw:transform="rotate (0.103498024643264) translate (1.55cm 7.74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3;p15" presentation:style-name="pr3" draw:text-style-name="P5" draw:layer="layout" svg:width="14.763cm" svg:height="1.48cm" svg:x="2.493cm" svg:y="8.507cm" presentation:class="title" presentation:user-transformed="true">
          <draw:text-box>
            <text:p text:style-name="P1"><text:span text:style-name="T5">4. Détection (Wazuh SIEM) + 5. Audit (Loki + Grafana)</text:span></text:p>
          </draw:text-box>
        </draw:frame>
        <draw:custom-shape draw:name="Google Shape;74;p15" draw:style-name="gr3" draw:text-style-name="P6" draw:layer="layout" svg:width="0.725cm" svg:height="0.129cm" draw:transform="rotate (0.103498024643264) translate (1.55cm 9.221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6;p15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6" presentation:class="page"/>
          <draw:frame draw:name="Google Shape;66;g3bc3b886ea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7" draw:style-name="dp4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frame draw:name="Google Shape;95;p17" presentation:style-name="pr3" draw:text-style-name="P5" draw:layer="layout" svg:width="14.763cm" svg:height="1.071cm" svg:x="5.218cm" svg:y="0.909cm" presentation:class="title" presentation:user-transformed="true">
          <draw:text-box>
            <text:p text:style-name="P7"><text:span text:style-name="T8">Preuves de Fonctionnement (POC)</text:span></text:p>
          </draw:text-box>
        </draw:frame>
        <draw:frame draw:name="Google Shape;96;p17" presentation:style-name="pr3" draw:text-style-name="P5" draw:layer="layout" svg:width="21.591cm" svg:height="0.873cm" svg:x="1.804cm" svg:y="12.412cm" presentation:class="title" presentation:user-transformed="true">
          <draw:text-box>
            <text:p text:style-name="P7"><text:span text:style-name="T9">25 incidents documentés · Symptôme → Cause racine → Fix → Apprentissage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610BB9CD14785A82.jpg" xlink:type="simple" xlink:show="embed" xlink:actuate="onLoad">
            <text:p/>
          </draw:image>
        </draw:frame>
        <draw:custom-shape draw:name="Google Shape;98;p17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f4f11f959e_0_29:notes" draw:style-name="gr2" draw:layer="layout" svg:width="16.932cm" svg:height="9.524cm" svg:x="1.059cm" svg:y="1.905cm" draw:page-number="7" presentation:class="page"/>
          <draw:frame draw:name="Google Shape;92;gf4f11f959e_0_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8" draw:style-name="dp4" draw:master-page-name="TITLE_5f_AND_5f_BODY" presentation:presentation-page-layout-name="AL2T1">
        <draw:frame draw:name="Google Shape;68;p15" presentation:style-name="pr3" draw:text-style-name="P5" draw:layer="layout" svg:width="14.763cm" svg:height="1.48cm" svg:x="3.313cm" svg:y="1.12cm" presentation:class="title" presentation:user-transformed="true">
          <draw:text-box>
            <text:p text:style-name="P1"><text:span text:style-name="T4">PCA/PRA et Conformité</text:span></text:p>
          </draw:text-box>
        </draw:frame>
        <draw:frame draw:name="Google Shape;69;p15" presentation:style-name="pr3" draw:text-style-name="P5" draw:layer="layout" svg:width="14.763cm" svg:height="1.48cm" svg:x="2.493cm" svg:y="5.546cm" presentation:class="title" presentation:user-transformed="true">
          <draw:text-box>
            <text:p text:style-name="P1"><text:span text:style-name="T5">PCA : 17 risques cotés · RTO/RPO · BIA sur 11 services</text:span></text:p>
          </draw:text-box>
        </draw:frame>
        <draw:custom-shape draw:name="Google Shape;70;p15" draw:style-name="gr3" draw:text-style-name="P6" draw:layer="layout" svg:width="0.725cm" svg:height="0.129cm" draw:transform="rotate (0.103498024643264) translate (1.55cm 6.25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5" presentation:style-name="pr3" draw:text-style-name="P5" draw:layer="layout" svg:width="14.763cm" svg:height="1.48cm" svg:x="2.493cm" svg:y="7.026cm" presentation:class="title" presentation:user-transformed="true">
          <draw:text-box>
            <text:p text:style-name="P1"><text:span text:style-name="T5">PRA : 5 scénarios · Sauvegarde 3-2-1 · Marseille = repli</text:span></text:p>
          </draw:text-box>
        </draw:frame>
        <draw:custom-shape draw:name="Google Shape;72;p15" draw:style-name="gr3" draw:text-style-name="P6" draw:layer="layout" svg:width="0.725cm" svg:height="0.129cm" draw:transform="rotate (0.103498024643264) translate (1.55cm 7.74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3;p15" presentation:style-name="pr3" draw:text-style-name="P5" draw:layer="layout" svg:width="14.763cm" svg:height="1.48cm" svg:x="2.493cm" svg:y="8.507cm" presentation:class="title" presentation:user-transformed="true">
          <draw:text-box>
            <text:p text:style-name="P1"><text:span text:style-name="T5">ISO 27001 · ANSSI · NIST · MITRE ATT&amp;CK · RGPD</text:span></text:p>
          </draw:text-box>
        </draw:frame>
        <draw:custom-shape draw:name="Google Shape;74;p15" draw:style-name="gr3" draw:text-style-name="P6" draw:layer="layout" svg:width="0.725cm" svg:height="0.129cm" draw:transform="rotate (0.103498024643264) translate (1.55cm 9.221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6;p15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8" presentation:class="page"/>
          <draw:frame draw:name="Google Shape;66;g3bc3b886ea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9" draw:style-name="dp4" draw:master-page-name="TITLE_5f_AND_5f_BODY" presentation:presentation-page-layout-name="AL2T1">
        <draw:frame draw:name="Google Shape;68;p15" presentation:style-name="pr3" draw:text-style-name="P5" draw:layer="layout" svg:width="14.763cm" svg:height="1.48cm" svg:x="3.313cm" svg:y="1.12cm" presentation:class="title" presentation:user-transformed="true">
          <draw:text-box>
            <text:p text:style-name="P1"><text:span text:style-name="T4">Étude Économique — TCO 3 ans</text:span></text:p>
          </draw:text-box>
        </draw:frame>
        <draw:frame draw:name="Google Shape;69;p15" presentation:style-name="pr3" draw:text-style-name="P5" draw:layer="layout" svg:width="14.763cm" svg:height="1.48cm" svg:x="2.493cm" svg:y="5.546cm" presentation:class="title" presentation:user-transformed="true">
          <draw:text-box>
            <text:p text:style-name="P1"><text:span text:style-name="T5">A. Propriétaire (VMware+MS) : 173 042 €</text:span></text:p>
          </draw:text-box>
        </draw:frame>
        <draw:custom-shape draw:name="Google Shape;70;p15" draw:style-name="gr3" draw:text-style-name="P6" draw:layer="layout" svg:width="0.725cm" svg:height="0.129cm" draw:transform="rotate (0.103498024643264) translate (1.55cm 6.25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5" presentation:style-name="pr3" draw:text-style-name="P5" draw:layer="layout" svg:width="14.763cm" svg:height="1.48cm" svg:x="2.493cm" svg:y="7.026cm" presentation:class="title" presentation:user-transformed="true">
          <draw:text-box>
            <text:p text:style-name="P1"><text:span text:style-name="T5">B. Open-source on-premise : 38 730 €  ← RETENUE</text:span></text:p>
          </draw:text-box>
        </draw:frame>
        <draw:custom-shape draw:name="Google Shape;72;p15" draw:style-name="gr3" draw:text-style-name="P6" draw:layer="layout" svg:width="0.725cm" svg:height="0.129cm" draw:transform="rotate (0.103498024643264) translate (1.55cm 7.74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3;p15" presentation:style-name="pr3" draw:text-style-name="P5" draw:layer="layout" svg:width="14.763cm" svg:height="1.48cm" svg:x="2.493cm" svg:y="8.507cm" presentation:class="title" presentation:user-transformed="true">
          <draw:text-box>
            <text:p text:style-name="P1"><text:span text:style-name="T5">C. Cloud public (AWS) : 95 200 €  |  −78% vs A</text:span></text:p>
          </draw:text-box>
        </draw:frame>
        <draw:custom-shape draw:name="Google Shape;74;p15" draw:style-name="gr3" draw:text-style-name="P6" draw:layer="layout" svg:width="0.725cm" svg:height="0.129cm" draw:transform="rotate (0.103498024643264) translate (1.55cm 9.221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6;p15" draw:style-name="gr3" draw:text-style-name="P6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9" presentation:class="page"/>
          <draw:frame draw:name="Google Shape;66;g3bc3b886ea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10" draw:style-name="dp6" draw:master-page-name="TITLE_5f_AND_5f_BODY" presentation:presentation-page-layout-name="AL2T1">
        <draw:frame draw:name="Google Shape;110;p19" presentation:style-name="pr3" draw:text-style-name="P5" draw:layer="layout" svg:width="14.763cm" svg:height="1.939cm" svg:x="3.432cm" svg:y="4.839cm" presentation:class="title" presentation:user-transformed="true">
          <draw:text-box>
            <text:p text:style-name="P1"><text:span text:style-name="T12">Questions ?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2010000044E000002002B4157F761680B93.png" xlink:type="simple" xlink:show="embed" xlink:actuate="onLoad">
            <text:p/>
          </draw:image>
        </draw:frame>
        <draw:frame draw:name="Google Shape;112;p19" presentation:style-name="pr3" draw:text-style-name="P5" draw:layer="layout" svg:width="14.763cm" svg:height="1.939cm" svg:x="3.541cm" svg:y="7.239cm" presentation:class="title" presentation:user-transformed="true">
          <draw:text-box>
            <text:p text:style-name="P1"><text:span text:style-name="T13">Dorian Poncelet — github.com/Dow08</text:span></text:p>
          </draw:text-box>
        </draw:frame>
        <draw:frame draw:name="Google Shape;113;p19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0" presentation:class="page"/>
          <draw:frame draw:name="Google Shape;108;g77ed9f117a_2_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Inter Medium" svg:font-family="'Inter Medium'"/>
    <style:font-face style:name="Inter SemiBold" svg:font-family="'Inter SemiBold'"/>
    <style:font-face style:name="Libre Baskerville" svg:font-family="'Libre Baskervill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8"/>
    <meta:generator>LibreOfficeDev/6.0.5.2$Linux_X86_64 LibreOffice_project/</meta:generator>
  </office:meta>
</office:document-meta>
</file>